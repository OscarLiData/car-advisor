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21409a" fo:font-size="16pt" officeooo:rsid="0012ef70" officeooo:paragraph-rsid="0012ef70" style:font-size-asian="16pt" style:font-size-complex="16pt"/>
    </style:style>
    <style:style style:name="P2" style:family="paragraph" style:parent-style-name="Standard">
      <style:text-properties fo:color="#000000" fo:font-size="14pt" officeooo:rsid="0013e5ed" officeooo:paragraph-rsid="0013e5ed" style:font-size-asian="12.25pt" style:font-size-complex="14pt"/>
    </style:style>
    <style:style style:name="P3" style:family="paragraph" style:parent-style-name="Standard">
      <style:text-properties fo:color="#000000" fo:font-size="14pt" officeooo:rsid="0013e5ed" officeooo:paragraph-rsid="00157379" style:font-size-asian="12.25pt" style:font-size-complex="14pt"/>
    </style:style>
    <style:style style:name="P4" style:family="paragraph" style:parent-style-name="Standard">
      <style:text-properties fo:color="#000000" fo:font-size="14pt" officeooo:rsid="00157379" officeooo:paragraph-rsid="00157379" style:font-size-asian="12.25pt" style:font-size-complex="14pt"/>
    </style:style>
    <style:style style:name="P5" style:family="paragraph" style:parent-style-name="Standard">
      <style:text-properties fo:color="#000000" fo:font-size="14pt" officeooo:rsid="001698fa" officeooo:paragraph-rsid="001698fa" style:font-size-asian="12.25pt" style:font-size-complex="14pt"/>
    </style:style>
    <style:style style:name="T1" style:family="text">
      <style:text-properties officeooo:rsid="00157379"/>
    </style:style>
    <style:style style:name="T2" style:family="text">
      <style:text-properties officeooo:rsid="001698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MDPD : SMART VEHICLE DECISION ANALYTICS</text:p>
      <text:p text:style-name="P1"/>
      <text:p text:style-name="P2">Tout d’abord, nous avons choisi <text:span text:style-name="T1">d’exploiter </text:span>la base de données d’ADEME, car <text:span text:style-name="T1">elle permet de répondre</text:span> <text:span text:style-name="T1">à un </text:span>besoin client universel et <text:span text:style-name="T1">s’inscrit dans une problématique écologique à fort</text:span> enjeu sociétal. </text:p>
      <text:p text:style-name="P3">À <text:span text:style-name="T1">partir de ce jeu de données</text:span>, nous avons décidé de <text:span text:style-name="T1">développer</text:span> <text:span text:style-name="T1">un outil d’aide au</text:span> choix d’un véhicule parmi ceux de la base. <text:span text:style-name="T1">L’objectif est de permettre à l’utilisateur d’identifier les modèles les plus adaptés à ses besoins selon différents critères.</text:span></text:p>
      <text:p text:style-name="P4">Pour inciter à penser aux modèles écologiques, il y aura également les informations relatives au bonus ou malus écologique applicable pour chaque véhicule <text:span text:style-name="T2">parmi la sélection</text:span>.</text:p>
      <text:p text:style-name="P2"/>
      <text:p text:style-name="P2">Grâce <text:span text:style-name="T1">au logigramme construit en amont, nous avons structuré le code en plusieurs scripts pythons distincts. Tout étant basé sur le projet type ainsi que les anciens projets des M2.</text:span></text:p>
      <text:p text:style-name="P4"/>
      <text:p text:style-name="P4">Pour cela, il fallait faire un environnement de travail adapté pour tous. <text:span text:style-name="T2">L</text:span>’installation de dockers n’<text:span text:style-name="T2">ayant pas abouti à ce stade</text:span>, nous avons donc travaillé sur VSCode avec un <text:span text:style-name="T2">environnement virtuel</text:span> local <text:span text:style-name="T2">(venv)</text:span>, <text:span text:style-name="T2">configurés à partir des dépendances de requirements.</text:span> <text:s/></text:p>
      <text:p text:style-name="P4"/>
      <text:p text:style-name="P5">Enfin, nous avons rédigé un README détaillé afin de faciliter la compréhension et la prise en main du projet, ainsi que les différents supports pour le rendu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9T11:03:58.582000000</meta:creation-date>
    <dc:date>2026-02-19T11:39:30.871000000</dc:date>
    <meta:editing-duration>PT4M18S</meta:editing-duration>
    <meta:editing-cycles>1</meta:editing-cycles>
    <meta:document-statistic meta:table-count="0" meta:image-count="0" meta:object-count="0" meta:page-count="1" meta:paragraph-count="7" meta:word-count="203" meta:character-count="1276" meta:non-whitespace-character-count="1076"/>
    <meta:generator>LibreOffice/6.0.7.3$Windows_X86_64 LibreOffice_project/dc89aa7a9eabfd848af146d5086077aeed2ae4a5</meta:generator>
  </office:meta>
</office:document-meta>
</file>